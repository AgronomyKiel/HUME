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keep-with-next="always" fo:keep-together="auto" fo:widows="2" fo:orphans="2" fo:break-before="page" fo:margin-top="0.0833in" fo:margin-bottom="0in" fo:line-height="200%" fo:margin-left="0.3506in" fo:text-indent="-0.3506in">
        <style:tab-stops>
          <style:tab-stop style:type="left" style:position="0.4368in"/>
        </style:tab-stops>
      </style:paragraph-properties>
      <style:text-properties style:font-name="Calibri" style:font-name-asian="Times New Roman" style:font-name-complex="Times New Roman" style:font-weight-complex="bold" fo:font-size="12pt" style:font-size-asian="12pt" style:font-size-complex="13pt" fo:language="en" fo:country="US" style:language-asian="en" style:country-asian="US"/>
    </style:style>
    <style:style style:name="P2" style:parent-style-name="Standard" style:family="paragraph">
      <style:paragraph-properties fo:keep-with-next="always" fo:widows="2" fo:orphans="2" fo:margin-top="0.0833in" fo:margin-bottom="0in" fo:line-height="200%">
        <style:tab-stops/>
      </style:paragraph-properties>
      <style:text-properties style:font-name="Calibri" style:font-name-asian="Times New Roman" style:font-name-complex="Times New Roman" style:font-weight-complex="bold" style:font-style-complex="italic" fo:font-size="12pt" style:font-size-asian="12pt" fo:language="en" fo:country="US" style:language-asian="en" style:country-asian="US"/>
    </style:style>
    <style:style style:name="P3" style:parent-style-name="Standard" style:family="paragraph">
      <style:paragraph-properties fo:keep-together="auto" fo:widows="2" fo:orphans="2" fo:margin-bottom="0in" fo:line-height="200%" fo:margin-left="0in">
        <style:tab-stops/>
      </style:paragraph-properties>
      <style:text-properties style:font-name="Calibri" style:font-name-asian="Calibri" style:font-name-complex="Times New Roman" fo:font-size="12pt" style:font-size-asian="12pt" fo:language="en" fo:country="US" style:language-asian="en" style:country-asian="US"/>
    </style:style>
    <style:style style:name="P4" style:parent-style-name="Standard" style:family="paragraph">
      <style:paragraph-properties fo:keep-together="auto" fo:widows="2" fo:orphans="2" fo:margin-bottom="0.1666in" fo:line-height="200%" fo:margin-left="0in">
        <style:tab-stops/>
      </style:paragraph-properties>
    </style:style>
    <style:style style:name="T5"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6"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7"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8"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P9" style:parent-style-name="Standard" style:family="paragraph">
      <style:paragraph-properties fo:keep-with-next="always" fo:widows="2" fo:orphans="2" fo:margin-top="0.0833in" fo:margin-bottom="0in" fo:line-height="200%">
        <style:tab-stops/>
      </style:paragraph-properties>
      <style:text-properties style:font-name="Calibri" style:font-name-asian="Times New Roman" style:font-name-complex="Times New Roman" style:font-weight-complex="bold" style:font-style-complex="italic" fo:font-size="12pt" style:font-size-asian="12pt" fo:language="en" fo:country="US" style:language-asian="en" style:country-asian="US"/>
    </style:style>
    <style:style style:name="P10" style:parent-style-name="Standard" style:family="paragraph">
      <style:paragraph-properties fo:keep-together="auto" fo:widows="2" fo:orphans="2" fo:margin-bottom="0in" fo:line-height="200%" fo:margin-left="0in">
        <style:tab-stops/>
      </style:paragraph-properties>
    </style:style>
    <style:style style:name="T11"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12" style:parent-style-name="Absatz-Standardschriftart" style:family="text">
      <style:text-properties style:font-name="Calibri" style:font-name-asian="Calibri" style:font-name-complex="Times New Roman" style:text-position="sub 66.6%" fo:font-size="12pt" style:font-size-asian="12pt" fo:language="en" fo:country="US" style:language-asian="en" style:country-asian="US"/>
    </style:style>
    <style:style style:name="T13"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14"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15"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16"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17"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18"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19"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20" style:parent-style-name="Absatz-Standardschriftart" style:family="text">
      <style:text-properties style:font-name="Calibri" style:font-name-asian="Calibri" style:font-name-complex="Times New Roman" style:text-position="sub 66.6%" fo:font-size="12pt" style:font-size-asian="12pt" fo:language="en" fo:country="US" style:language-asian="en" style:country-asian="US"/>
    </style:style>
    <style:style style:name="T21"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22"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23"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24"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25"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26" style:parent-style-name="Absatz-Standardschriftart" style:family="text">
      <style:text-properties style:font-name="Calibri" style:font-name-asian="Calibri" style:font-name-complex="Times New Roman" style:text-position="sub 66.6%" fo:font-size="12pt" style:font-size-asian="12pt" fo:language="en" fo:country="US" style:language-asian="en" style:country-asian="US"/>
    </style:style>
    <style:style style:name="T27"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28"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29"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30"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31"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32" style:parent-style-name="Absatz-Standardschriftart" style:family="text">
      <style:text-properties style:font-name="Calibri" style:font-name-asian="Calibri" style:font-name-complex="Times New Roman" style:text-position="super 66.6%" fo:font-size="12pt" style:font-size-asian="12pt" fo:language="en" fo:country="US" style:language-asian="en" style:country-asian="US"/>
    </style:style>
    <style:style style:name="T33"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34" style:parent-style-name="Absatz-Standardschriftart" style:family="text">
      <style:text-properties style:font-name="Calibri" style:font-name-asian="Calibri" style:font-name-complex="Times New Roman" style:text-position="sub 66.6%" fo:font-size="12pt" style:font-size-asian="12pt" fo:language="en" fo:country="US" style:language-asian="en" style:country-asian="US"/>
    </style:style>
    <style:style style:name="T35"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36" style:parent-style-name="Absatz-Standardschriftart" style:family="text">
      <style:text-properties style:font-name="Calibri" style:font-name-asian="Calibri" style:font-name-complex="Times New Roman" style:text-position="sub 66.6%" fo:font-size="12pt" style:font-size-asian="12pt" fo:language="en" fo:country="US" style:language-asian="en" style:country-asian="US"/>
    </style:style>
    <style:style style:name="T37"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38" style:parent-style-name="Absatz-Standardschriftart" style:family="text">
      <style:text-properties style:font-name="Calibri" style:font-name-asian="Calibri" style:font-name-complex="Times New Roman" style:text-position="sub 66.6%" fo:font-size="12pt" style:font-size-asian="12pt" fo:language="en" fo:country="US" style:language-asian="en" style:country-asian="US"/>
    </style:style>
    <style:style style:name="T39"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P40" style:parent-style-name="Standard" style:family="paragraph">
      <style:paragraph-properties fo:keep-together="auto" fo:widows="2" fo:orphans="2" fo:margin-bottom="0in" fo:line-height="200%" fo:margin-left="0in">
        <style:tab-stops/>
      </style:paragraph-properties>
      <style:text-properties style:font-name="Calibri" style:font-name-asian="Calibri" style:font-name-complex="Times New Roman" fo:font-size="12pt" style:font-size-asian="12pt" fo:language="en" fo:country="US" style:language-asian="en" style:country-asian="US"/>
    </style:style>
    <style:style style:name="P41" style:parent-style-name="Standard" style:family="paragraph">
      <style:paragraph-properties fo:keep-together="auto" fo:widows="2" fo:orphans="2" fo:margin-bottom="0.1666in" fo:line-height="100%" fo:margin-left="0in">
        <style:tab-stops/>
      </style:paragraph-properties>
    </style:style>
    <style:style style:name="T42"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43"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44"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45"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46"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47" style:parent-style-name="Standard" style:family="paragraph">
      <style:paragraph-properties fo:keep-together="auto" fo:widows="2" fo:orphans="2" fo:margin-bottom="0in" fo:line-height="200%" fo:margin-left="0in">
        <style:tab-stops/>
      </style:paragraph-properties>
      <style:text-properties style:font-name="Calibri" style:font-name-asian="Calibri" style:font-name-complex="Times New Roman" fo:font-size="12pt" style:font-size-asian="12pt" fo:language="en" fo:country="US" style:language-asian="en" style:country-asian="US"/>
    </style:style>
    <style:style style:name="P48" style:parent-style-name="Standard" style:family="paragraph">
      <style:paragraph-properties fo:keep-together="auto" fo:widows="2" fo:orphans="2" fo:margin-bottom="0.1666in" fo:line-height="200%" fo:margin-left="0in">
        <style:tab-stops/>
      </style:paragraph-properties>
    </style:style>
    <style:style style:name="T49" style:parent-style-name="Absatz-Standardschriftart" style:family="text">
      <style:text-properties style:font-name="Calibri" style:font-name-asian="Times New Roman" style:font-name-complex="Times New Roman" style:font-weight-complex="bold" fo:font-size="12pt" style:font-size-asian="12pt" fo:language="en" fo:country="US" style:language-asian="en" style:country-asian="US"/>
    </style:style>
    <style:style style:name="T50" style:parent-style-name="Absatz-Standardschriftart" style:family="text">
      <style:text-properties style:font-name="Calibri" style:font-name-asian="Times New Roman" style:font-name-complex="Times New Roman" style:font-weight-complex="bold" fo:font-size="12pt" style:font-size-asian="12pt" fo:language="en" fo:country="US" style:language-asian="en" style:country-asian="US"/>
    </style:style>
    <style:style style:name="T51" style:parent-style-name="Absatz-Standardschriftart" style:family="text">
      <style:text-properties style:font-name="Calibri" style:font-name-asian="Times New Roman" style:font-name-complex="Times New Roman" style:font-weight-complex="bold" fo:font-size="12pt" style:font-size-asian="12pt" fo:language="en" fo:country="US" style:language-asian="en" style:country-asian="US"/>
    </style:style>
    <style:style style:name="T52"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53"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54"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55"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P56" style:parent-style-name="Standard" style:family="paragraph">
      <style:paragraph-properties fo:keep-together="auto" fo:widows="2" fo:orphans="2" fo:margin-bottom="0in" fo:line-height="200%" fo:margin-left="0in">
        <style:tab-stops/>
      </style:paragraph-properties>
    </style:style>
    <style:style style:name="T57"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58"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59"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60"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61"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T62" style:parent-style-name="Absatz-Standardschriftart" style:family="text">
      <style:text-properties style:font-name="Calibri" style:font-name-asian="Calibri" style:font-name-complex="Times New Roman" fo:font-size="12pt" style:font-size-asian="12pt" fo:language="en" fo:country="US" style:language-asian="en" style:country-asian="US"/>
    </style:style>
    <style:style style:name="P63" style:parent-style-name="Standard" style:family="paragraph">
      <style:paragraph-properties fo:keep-together="auto" fo:widows="2" fo:orphans="2" fo:margin-bottom="0in" fo:line-height="200%" fo:margin-left="0in">
        <style:tab-stops/>
      </style:paragraph-properties>
    </style:style>
    <style:style style:name="T64"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65"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66"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67"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68"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69"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70"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71"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72"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73"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74"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75"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76"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P77"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78"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79"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80"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81"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82" style:parent-style-name="Standard" style:family="paragraph">
      <style:paragraph-properties fo:keep-together="auto" fo:widows="2" fo:orphans="2" fo:margin-bottom="0.1666in" fo:line-height="100%" fo:margin-left="0in">
        <style:tab-stops/>
      </style:paragraph-properties>
    </style:style>
    <style:style style:name="T83"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84"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85"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86"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87" style:parent-style-name="Standard" style:family="paragraph">
      <style:paragraph-properties fo:keep-together="auto" fo:widows="2" fo:orphans="2" fo:margin-bottom="0.1666in" fo:line-height="100%" fo:margin-left="0in">
        <style:tab-stops/>
      </style:paragraph-properties>
    </style:style>
    <style:style style:name="T88"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89"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90"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91"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92"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93"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94"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95"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96" style:parent-style-name="Standard" style:family="paragraph">
      <style:paragraph-properties fo:keep-together="auto" fo:widows="2" fo:orphans="2" fo:margin-bottom="0.1666in" fo:line-height="100%" fo:margin-left="0in">
        <style:tab-stops/>
      </style:paragraph-properties>
    </style:style>
    <style:style style:name="T97"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98"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99"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00"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01" style:parent-style-name="Standard" style:family="paragraph">
      <style:paragraph-properties fo:keep-together="auto" fo:widows="2" fo:orphans="2" fo:margin-bottom="0.1666in" fo:line-height="100%" fo:margin-left="0in">
        <style:tab-stops/>
      </style:paragraph-properties>
    </style:style>
    <style:style style:name="T102"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03"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04"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05"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06" style:parent-style-name="Standard" style:family="paragraph">
      <style:paragraph-properties fo:keep-together="auto" fo:widows="2" fo:orphans="2" fo:margin-bottom="0in" fo:line-height="200%" fo:margin-left="0in">
        <style:tab-stops/>
      </style:paragraph-properties>
    </style:style>
    <style:style style:name="T107"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08"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09"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10"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11"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P112" style:parent-style-name="Standard" style:family="paragraph">
      <style:paragraph-properties fo:keep-together="auto" fo:widows="2" fo:orphans="2" fo:margin-bottom="0.1666in" fo:line-height="100%" fo:margin-left="0in">
        <style:tab-stops/>
      </style:paragraph-properties>
    </style:style>
    <style:style style:name="T113"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14"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15"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16"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17" style:parent-style-name="Standard" style:family="paragraph">
      <style:paragraph-properties fo:keep-together="auto" fo:widows="2" fo:orphans="2" fo:margin-bottom="0in" fo:line-height="200%" fo:margin-left="0in">
        <style:tab-stops/>
      </style:paragraph-properties>
    </style:style>
    <style:style style:name="T118"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19" style:parent-style-name="Absatz-Standardschriftart" style:family="text">
      <style:text-properties style:font-name="Times New Roman" style:font-name-asian="Calibri" style:font-name-complex="Times New Roman" fo:font-size="12pt" style:font-size-asian="12pt" style:font-size-complex="12pt" style:language-asian="en" style:country-asian="US"/>
    </style:style>
    <style:style style:name="T120"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P121"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2"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3"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4"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5"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6"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7"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8"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29"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30"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31" style:parent-style-name="Standard" style:family="paragraph">
      <style:paragraph-properties fo:keep-together="auto" fo:widows="2" fo:orphans="2" fo:margin-bottom="0.1666in" fo:line-height="100%" fo:margin-left="0in">
        <style:tab-stops/>
      </style:paragraph-properties>
    </style:style>
    <style:style style:name="T132"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33"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34"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35"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36" style:parent-style-name="Standard" style:family="paragraph">
      <style:paragraph-properties fo:keep-with-next="always" fo:widows="2" fo:orphans="2" fo:margin-top="0.0833in" fo:margin-bottom="0in" fo:line-height="200%">
        <style:tab-stops/>
      </style:paragraph-properties>
      <style:text-properties style:font-name="Calibri" style:font-name-asian="Times New Roman" style:font-name-complex="Times New Roman" style:font-weight-complex="bold" style:font-style-complex="italic" fo:font-size="12pt" style:font-size-asian="12pt" fo:language="en" fo:country="US" style:language-asian="en" style:country-asian="US"/>
    </style:style>
    <style:style style:name="P137" style:parent-style-name="Standard" style:family="paragraph">
      <style:paragraph-properties fo:keep-together="auto" fo:widows="2" fo:orphans="2" fo:margin-bottom="0in" fo:line-height="200%" fo:margin-left="0in">
        <style:tab-stops/>
      </style:paragraph-properties>
    </style:style>
    <style:style style:name="T138"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39"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40"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41" style:parent-style-name="Absatz-Standardschriftart" style:family="text">
      <style:text-properties style:font-name="Calibri" style:font-name-asian="Times New Roman" style:font-name-complex="Times New Roman" style:text-position="super 66.6%" fo:font-size="12pt" style:font-size-asian="12pt" fo:language="en" fo:country="US" style:language-asian="en" style:country-asian="US"/>
    </style:style>
    <style:style style:name="T142"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43"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44"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45" style:parent-style-name="Absatz-Standardschriftart" style:family="text">
      <style:text-properties style:font-name="Calibri" style:font-name-asian="Times New Roman" style:font-name-complex="Times New Roman" style:text-position="super 66.6%" fo:font-size="12pt" style:font-size-asian="12pt" fo:language="en" fo:country="US" style:language-asian="en" style:country-asian="US"/>
    </style:style>
    <style:style style:name="T146"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47" style:parent-style-name="Absatz-Standardschriftart" style:family="text">
      <style:text-properties style:font-name="Calibri" style:font-name-asian="Times New Roman" style:font-name-complex="Times New Roman" fo:font-weight="bold" style:font-weight-asian="bold" style:font-weight-complex="bold" fo:font-size="12pt" style:font-size-asian="12pt" fo:background-color="#FFFF00" fo:language="en" fo:country="US" style:language-asian="en" style:country-asian="US"/>
    </style:style>
    <style:style style:name="T148"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49"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50"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51"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52"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53"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54"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55"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56"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57" style:parent-style-name="Absatz-Standardschriftart" style:family="text">
      <style:text-properties style:font-name="Calibri" style:font-name-asian="Times New Roman" style:font-name-complex="Times New Roman" style:text-position="sub 66.6%" fo:font-size="12pt" style:font-size-asian="12pt" fo:language="en" fo:country="US" style:language-asian="en" style:country-asian="US"/>
    </style:style>
    <style:style style:name="T158"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T159" style:parent-style-name="Absatz-Standardschriftart" style:family="text">
      <style:text-properties style:font-name="Calibri" style:font-name-asian="Times New Roman" style:font-name-complex="Times New Roman" fo:font-size="12pt" style:font-size-asian="12pt" fo:language="en" fo:country="US" style:language-asian="en" style:country-asian="US"/>
    </style:style>
    <style:style style:name="P160"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61"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62"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63"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64" style:parent-style-name="Standard" style:family="paragraph">
      <style:paragraph-properties fo:keep-together="auto" fo:widows="2" fo:orphans="2" fo:margin-bottom="0.1666in" fo:line-height="100%" fo:margin-left="0in">
        <style:tab-stops/>
      </style:paragraph-properties>
    </style:style>
    <style:style style:name="T165"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66"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67"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68"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69"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70" style:parent-style-name="Standard" style:family="paragraph">
      <style:paragraph-properties fo:keep-together="auto" fo:widows="2" fo:orphans="2" fo:margin-bottom="0.1666in" fo:line-height="100%" fo:margin-left="0in">
        <style:tab-stops/>
      </style:paragraph-properties>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71" style:parent-style-name="Standard" style:family="paragraph">
      <style:paragraph-properties fo:keep-together="auto" fo:widows="2" fo:orphans="2" fo:margin-bottom="0.1666in" fo:line-height="100%" fo:margin-left="0in">
        <style:tab-stops/>
      </style:paragraph-properties>
    </style:style>
    <style:style style:name="T172"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73"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74"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75"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76" style:parent-style-name="Standard" style:family="paragraph">
      <style:paragraph-properties fo:keep-together="auto" fo:widows="2" fo:orphans="2" fo:margin-bottom="0.1666in" fo:line-height="100%" fo:margin-left="0in">
        <style:tab-stops/>
      </style:paragraph-properties>
    </style:style>
    <style:style style:name="T177"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78"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79"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T180" style:parent-style-name="Absatz-Standardschriftart" style:family="text">
      <style:text-properties style:font-name="Calibri" style:font-name-asian="Calibri" style:font-name-complex="Times New Roman" style:font-weight-complex="bold" fo:font-size="12pt" style:font-size-asian="12pt" style:font-size-complex="9pt" fo:language="en" fo:country="US" style:language-asian="en" style:country-asian="US"/>
    </style:style>
    <style:style style:name="P181" style:parent-style-name="Standard" style:family="paragraph">
      <style:text-properties fo:language="en" fo:country="US"/>
    </style:style>
  </office:automatic-styles>
  <office:body>
    <office:text text:use-soft-page-breaks="true">
      <text:list text:style-name="LFO5" text:continue-numbering="true">
        <text:list-item>
          <text:list>
            <text:list-item>
              <text:list>
                <text:list-item>
                  <text:p text:style-name="P1">Plant growth model</text:p>
                </text:list-item>
              </text:list>
            </text:list-item>
          </text:list>
        </text:list-item>
      </text:list>
      <text:h text:style-name="P2" text:outline-level="4">Crop height</text:h>
      <text:p text:style-name="P3">Crop height was calculated with an exponential function based on growth stages and had an upper limit of 1.8 m (Eq. 1).<text:s/></text:p>
      <text:p text:style-name="P4"><text:span text:style-name="T5">$\text{CropHeight=min(1}\text{.8,}{{\text{p}}_{\text{H1}}}\text{*e}{{\text{ }\!\!~\!\!\text{ }}^{{{\text{p}}_{\text{H2}}}\text{*EC}}}\text{)}$</text:span><text:span text:style-name="T6"><text:tab/>(</text:span><text:span text:style-name="T7">1</text:span><text:span text:style-name="T8">)</text:span></text:p>
      <text:h text:style-name="P9" text:outline-level="4">Dry matter production</text:h>
      <text:p text:style-name="P10"><text:span text:style-name="T11">Daily increase of crop dry matter (DM</text:span><text:span text:style-name="T12">Plant</text:span><text:span text:style-name="T13">, [g m</text:span><text:span text:style-name="T14">-2</text:span><text:span text:style-name="T15">] eqs. 2 and 3) was calculated from photosynthetic active radiation (PAR [MJ m</text:span><text:span text:style-name="T16">-2</text:span><text:span text:style-name="T17"><text:s/>d</text:span><text:span text:style-name="T18">-1</text:span><text:span text:style-name="T19">]) absorbed by leaves (Q</text:span><text:span text:style-name="T20">Leaf</text:span><text:span text:style-name="T21"><text:s/>[MJ m</text:span><text:span text:style-name="T22">-2</text:span><text:span text:style-name="T23"><text:s/>d</text:span><text:span text:style-name="T24">-1</text:span><text:span text:style-name="T25">], eq. 7) and pods (Q</text:span><text:span text:style-name="T26">Pod</text:span><text:span text:style-name="T27"><text:s/>[MJ m</text:span><text:span text:style-name="T28">-2</text:span><text:span text:style-name="T29"><text:s/>d</text:span><text:span text:style-name="T30">-1</text:span><text:span text:style-name="T31">], eq. 8), potential light use efficiency (LUE [g MJ</text:span><text:span text:style-name="T32">-1</text:span><text:span text:style-name="T33">]) during vegetative (LUE</text:span><text:span text:style-name="T34">veg</text:span><text:span text:style-name="T35">) and generative (LUE</text:span><text:span text:style-name="T36">gen</text:span><text:span text:style-name="T37">) growth stages, a temperature dependent scaling factor for photosynthetic activity (fT, eq. 13) and a soil water deficit scaling factor (SWDF, eq. 9). N deficiencies were considered by an organ specific N deficit scaling factor (NNI</text:span><text:span text:style-name="T38">i</text:span><text:span text:style-name="T39">, section 2.2.2.7).</text:span></text:p>
      <text:p text:style-name="P40">During vegetative growth (EC &lt; 51), dry matter production is calculated as follows:</text:p>
      <text:p text:style-name="P41"><text:span text:style-name="T42">$\frac{\text{dD}{{\text{M}}_{\text{Plant}}}}{\text{dt}}\text{= }\!\!~\!\!\text{ }{{\text{Q}}_{\text{Leaf}}}\text{*LU}{{\text{E}}_{\text{veg}}}\text{*}\left( \frac{\text{LAI*NN}{{\text{I}}_{\text{Leaf}}}\text{+SAI*NN}{{\text{I}}_{\text{Stem}}}}{\text{LAI+SAI}} \right)\text{*fT*SWDF}$</text:span><text:span text:style-name="T43"><text:s/></text:span><text:span text:style-name="T44"><text:tab/>(</text:span><text:span text:style-name="T45">2</text:span><text:span text:style-name="T46">)</text:span></text:p>
      <text:p text:style-name="P47">Dry matter production during generative growth (EC ≥ 51) is calculated according to the following equation:</text:p>
      <text:p text:style-name="P48"><text:span text:style-name="T49">$\frac{\text{dD}{{\text{M}}_{\text{Plant}}}}{\text{dt}}\text{=((}{{\text{Q}}_{\text{Leaf}}}\text{*LU}{{\text{E}}_{\text{Gen}}}\text{*}\left( \frac{\text{LAI*NN}{{\text{I}}_{\text{Leaf}}}\text{+SAI*NN}{{\text{I}}_{\text{Stem}}}}{\text{LAI+SAI}} \right)\text{)+(}{{\text{Q}}_{\text{Pod}}}\text{*LU}{{\text{E}}_{\text{Gen}}}\text{*NN}{{\text{I</text:span><text:soft-page-break/><text:span text:style-name="T50">}}_{\text{Gen}}}\text{))*fT*SWDF}$</text:span><text:span text:style-name="T51"><text:tab/></text:span><text:span text:style-name="T52">(</text:span><text:span text:style-name="T53">3</text:span><text:span text:style-name="T54">)</text:span><text:span text:style-name="T55"><text:line-break/>where LAI is the leaf area index and SAI is the stem area index. This calculation of crop DM growth considers the net effect of photosynthesis and autotrophic respiration. However, during seed filling an increased respiration loss is assumed due to the conversion of carbohydrates to lipids in the growing seeds. This respiration loss is subtracted from the dry matter accumulation according to</text:span></text:p>
      <text:p text:style-name="P56"><text:span text:style-name="T57">$\text{Res}{{\text{p}}_{\text{loss}}}\text{=}\frac{\text{DMseed}}{\text{dt}}\text{*Oilconcentration*0}\text{.4}$</text:span><text:span text:style-name="T58"><text:s/></text:span><text:span text:style-name="T59"><text:tab/></text:span><text:span text:style-name="T60">(</text:span><text:span text:style-name="T61">4</text:span><text:span text:style-name="T62">)</text:span></text:p>
      <text:p text:style-name="P63"><text:span text:style-name="T64">Absorbed PAR is reduced by canopy reflection. As in many crop growth models, the empirical extinction coefficient used to calculate light interception implicitly accounts for this effect. As long as LAI does not exceed LAI</text:span><text:span text:style-name="T65">crit</text:span><text:span text:style-name="T66"><text:s/>of 1.5, light extinction coefficient of leaves (k</text:span><text:span text:style-name="T67">Leaf</text:span><text:span text:style-name="T68">) varies between 0.8 and 0.9 and is described by a negative linear-plateau function of LAI (eq. 6). This assumption is based on experimental data showing that k</text:span><text:span text:style-name="T69">Leaf</text:span><text:span text:style-name="T70"><text:s/>decreases with increasing LAI (Data set 2).</text:span><text:span text:style-name="T71"><text:s/></text:span><text:span text:style-name="T72">To calculate the absorbed PAR by the crop, the light extinction coefficient of pods (k</text:span><text:span text:style-name="T73">Pod</text:span><text:span text:style-name="T74">) and the pod area index (PAI) have to be considered. Furthermore, only a fraction (f</text:span><text:span text:style-name="T75">Tr</text:span><text:span text:style-name="T76">) of PAR is transmitted to the leaves while the rest is reflected or absorbed by flowers and pods. Canopy architecture was simplified by assuming that flower and pod layers are located above the leaves. We assumed that at the onset of flowering, flower layer starts to absorb and reflect PAR (eq. 5). The proportion of absorbed and reflected PAR increases linearly with growth stage, until 30% of incoming PAR is absorbed and reflected by the flower layer at full flower. From full flower until end of flowering, the proportion of absorbed and reflected PAR decreases linearly.</text:span></text:p>
      <text:p text:style-name="P77">${{\text{f}}_{\text{Tr}}}\text{=}\left\{ \begin{array}{*{35}{l}}</text:p>
      <text:p text:style-name="P78"><text:s text:c="3"/>\text{1} &amp; \text{EC60} <text:s/>\\</text:p>
      <text:soft-page-break/>
      <text:p text:style-name="P79"><text:s text:c="3"/>\text{1+}\frac{\text{0}\text{.7-1}}{\text{65-60}}\text{*(EC-60)} &amp; \text{60}\le \text{EC}\le \text{65} <text:s/>\\</text:p>
      <text:p text:style-name="P80"><text:s text:c="3"/>\text{0}\text{.7+}\frac{\text{1-0}\text{.7}}{\text{70-65}}\text{*(EC-65)} &amp; \text{65EC}\le \text{70} <text:s/>\\</text:p>
      <text:p text:style-name="P81"><text:s text:c="3"/>\text{1} &amp; \text{EC70} <text:s/>\\</text:p>
      <text:p text:style-name="P82"><text:span text:style-name="T83">\end{array} \right.$</text:span><text:span text:style-name="T84"><text:tab/>(</text:span><text:span text:style-name="T85">5</text:span><text:span text:style-name="T86">)</text:span></text:p>
      <text:p text:style-name="P87"><text:span text:style-name="T88">${{\text{k}}_{\text{Leaf}}}\text{=0}\text{.9-}\left( \text{0}\text{.8-0}\text{.9} \right)\text{*}\frac{\text{LAI}}{\text{LA}{{\text{I}}_{\text{crit}}}}\text{, }\!\!~\!\!\text{ <text:s/>}\!\!~\!\!\text{ <text:s/>}\!\!~\!\!\text{ <text:s/>}\!\!~\!\!\text{ <text:s/>}\!\!~\!\!\text{ <text:s/>}\!\!~\!\!\text{ <text:s/>}\!\!~\!\!\text{ <text:s/>}\!\!~\!\!\text{ <text:s/>}\!\!~\!\!\text{ <text:s/>}\!\!~\!\!\text{ <text:s/>}\!\!~\!\!\text{ <text:s/>}\!\!~\!\!\text{ LAILA}{{\text{I}}_{\text{crit}}}$</text:span><text:span text:style-name="T89"><text:s/></text:span><text:span text:style-name="T90"><text:tab/>(</text:span><text:span text:style-name="T91">6</text:span><text:span text:style-name="T92">)</text:span></text:p>
      <text:p text:style-name="P93">${{\text{Q}}_{\text{Leaf}}}\text{=}\left\{ \begin{array}{*{35}{l}}</text:p>
      <text:p text:style-name="P94"><text:s text:c="3"/>\text{PAR*}\left( \text{1-}{{\text{e}}^{\text{-}{{\text{k}}_{\text{Leaf}}}\text{*LAI}}} \right)\text{*}{{\text{f}}_{\text{Tr}}}\text{, }\!\!~\!\!\text{ <text:s/>}\!\!~\!\!\text{ <text:s/>}\!\!~\!\!\text{ <text:s/>}\!\!~\!\!\text{ <text:s/>}\!\!~\!\!\text{ <text:s/>}\!\!~\!\!\text{ <text:s/>}\!\!~\!\!\text{ <text:s/>}\!\!~\!\!\text{ <text:s/>}\!\!~\!\!\text{ <text:s/>}\!\!~\!\!\text{ <text:s/>}\!\!~\!\!\text{ <text:s/>}\!\!~\!\!\text{ <text:s/>}\!\!~\!\!\text{ <text:s/>}\!\!~\!\!\text{ <text:s/>}\!\!~\!\!\text{ <text:s/>}\!\!~\!\!\text{ <text:s/>}\!\!~\!\!\text{ <text:s/>}\!\!~\!\!\text{ <text:s/>}\!\!~\!\!\text{ <text:s/>}\!\!~\!\!\text{ <text:s/>}\!\!~\!\!\text{ <text:s/>}\!\!~\!\!\text{ EC}\le \text{51} <text:s/>\\</text:p>
      <text:p text:style-name="P95"><text:s text:c="3"/>\text{PAR- }\!\!~\!\!\text{ }{{\text{Q}}_{\text{Pod}}}\text{*}\left( \text{1-}{{\text{e}}^{\text{-}{{\text{k}}_{\text{Leaf}}}\text{*LAI}}} \right)\text{*}{{\text{f}}_{\text{Tr}}}\text{, }\!\!~\!\!\text{ <text:s/>}\!\!~\!\!\text{ <text:s/>}\!\!~\!\!\text{ <text:s/>}\!\!~\!\!\text{ <text:s/>}\!\!~\!\!\text{ <text:s/>}\!\!~\!\!\text{ EC51 }\!\!~\!\!\text{ <text:s/>}\!\!~\!\!\text{ } <text:s/>\\</text:p>
      <text:p text:style-name="P96"><text:span text:style-name="T97">\end{array} \right.$</text:span><text:span text:style-name="T98"><text:tab/>(</text:span><text:span text:style-name="T99">7</text:span><text:span text:style-name="T100">)</text:span></text:p>
      <text:p text:style-name="P101"><text:span text:style-name="T102">${{\text{Q}}_{\text{Pod}}}\text{=PAR*}\left( \text{1-}{{\text{e}}^{\text{-}{{\text{k}}_{\text{Pod}}}\text{*PAI}}} \right)$</text:span><text:span text:style-name="T103"><text:tab/>(</text:span><text:span text:style-name="T104">8</text:span><text:span text:style-name="T105">)</text:span></text:p>
      <text:p text:style-name="P106"><text:span text:style-name="T107">The soil water deficit factor is defined as the ratio between actual and potential transpiration (T</text:span><text:span text:style-name="T108">act</text:span><text:span text:style-name="T109">/T</text:span><text:span text:style-name="T110">pot</text:span><text:span text:style-name="T111">) and a parameter describing a non-linear response to drought stress (pfW), as proposed by Ferreyra et al. (2003):</text:span></text:p>
      <text:p text:style-name="P112"><text:span text:style-name="T113">$\text{SWDF=1-(1-}\frac{{{\text{T}}_{\text{act}}}}{{{\text{T}}_{\text{pot}}}}{{\text{)}}^{\text{pfW}}}$</text:span><text:span text:style-name="T114"><text:tab/>(</text:span><text:span text:style-name="T115">9</text:span><text:span text:style-name="T116">)</text:span></text:p>
      <text:p text:style-name="P117"><text:span text:style-name="T118">The temperature function of photosynthetic activity (eq. 10) is described by an optimum function with four cardinal temperatures, as follows (</text:span><text:span text:style-name="T119">Marshall and Squire 1996, Porter and Gawith 1999</text:span><text:span text:style-name="T120">):</text:span></text:p>
      <text:soft-page-break/>
      <text:p text:style-name="P121">$\text{fT=}\left\{ \begin{array}{*{35}{l}}</text:p>
      <text:p text:style-name="P122"><text:s text:c="3"/>\text{0, }\!\!~\!\!\text{ <text:s/>}\!\!~\!\!\text{ <text:s/>}\!\!~\!\!\text{ <text:s/>}\!\!~\!\!\text{ <text:s/>}\!\!~\!\!\text{ <text:s/>}\!\!~\!\!\text{ <text:s/>}\!\!~\!\!\text{ <text:s/>}\!\!~\!\!\text{ <text:s/>}\!\!~\!\!\text{ <text:s/>}\!\!~\!\!\text{ <text:s/>}\!\!~\!\!\text{ <text:s/>}\!\!~\!\!\text{ <text:s/>}\!\!~\!\!\text{ <text:s/>}\!\!~\!\!\text{ <text:s/>}\!\!~\!\!\text{ <text:s/>}\!\!~\!\!\text{ <text:s/>}\!\!~\!\!\text{ <text:s/>}\!\!~\!\!\text{ }{{\text{T}}_{\text{mean}}}\text{}{{\text{T}}_{\text{1}}} <text:s/>\\</text:p>
      <text:p text:style-name="P123"><text:s text:c="3"/>\frac{{{\text{T}}_{\text{mean}}}\text{-}{{\text{T}}_{\text{1}}}}{{{\text{T}}_{\text{2}}}\text{-}{{\text{T}}_{\text{1}}}}\text{, }\!\!~\!\!\text{ <text:s/>}\!\!~\!\!\text{ <text:s/>}\!\!~\!\!\text{ <text:s/>}\!\!~\!\!\text{ <text:s/>}\!\!~\!\!\text{ }{{\text{T}}_{\text{1}}}\text{}\le {{\text{T}}_{\text{2}}} <text:s/>\\</text:p>
      <text:p text:style-name="P124"><text:s text:c="3"/>\begin{array}{*{35}{l}}</text:p>
      <text:p text:style-name="P125"><text:s text:c="3"/>\text{1, }\!\!~\!\!\text{ <text:s/>}\!\!~\!\!\text{ <text:s/>}\!\!~\!\!\text{ <text:s/>}\!\!~\!\!\text{ <text:s/>}\!\!~\!\!\text{ <text:s/>}\!\!~\!\!\text{ <text:s/>}\!\!~\!\!\text{ <text:s/>}\!\!~\!\!\text{ <text:s/>}\!\!~\!\!\text{ <text:s/>}\!\!~\!\!\text{ <text:s/>}\!\!~\!\!\text{ <text:s/>}\!\!~\!\!\text{ <text:s/>}\!\!~\!\!\text{ <text:s/>}\!\!~\!\!\text{ <text:s/>}\!\!~\!\!\text{ <text:s/>}\!\!~\!\!\text{ <text:s/>}\!\!~\!\!\text{ <text:s/>}\!\!~\!\!\text{ }{{\text{T}}_{\text{2}}}\text{}{{\text{T}}_{\text{mean}}}\le {{\text{T}}_{\text{3}}} <text:s/>\\</text:p>
      <text:p text:style-name="P126"><text:s text:c="3"/>\begin{array}{*{35}{l}}</text:p>
      <text:p text:style-name="P127"><text:s text:c="3"/>\frac{{{\text{T}}_{\text{4}}}\text{-}{{\text{T}}_{\text{mean}}}}{{{\text{T}}_{\text{4}}}\text{-}{{\text{T}}_{\text{3}}}}\text{, }\!\!~\!\!\text{ <text:s/>}\!\!~\!\!\text{ <text:s/>}\!\!~\!\!\text{ <text:s/>}\!\!~\!\!\text{ <text:s/>}\!\!~\!\!\text{ }{{\text{T}}_{\text{3}}}\text{}{{\text{T}}_{\text{mean}}}\le {{\text{T}}_{\text{4}}} <text:s/>\\</text:p>
      <text:p text:style-name="P128"><text:s text:c="3"/>\text{0, }\!\!~\!\!\text{ <text:s/>}\!\!~\!\!\text{ <text:s/>}\!\!~\!\!\text{ <text:s/>}\!\!~\!\!\text{ <text:s/>}\!\!~\!\!\text{ <text:s/>}\!\!~\!\!\text{ <text:s/>}\!\!~\!\!\text{ <text:s/>}\!\!~\!\!\text{ <text:s/>}\!\!~\!\!\text{ <text:s/>}\!\!~\!\!\text{ <text:s/>}\!\!~\!\!\text{ <text:s/>}\!\!~\!\!\text{ <text:s/>}\!\!~\!\!\text{ <text:s/>}\!\!~\!\!\text{ <text:s/>}\!\!~\!\!\text{ <text:s/>}\!\!~\!\!\text{ <text:s/>}\!\!~\!\!\text{ <text:s/>}\!\!~\!\!\text{ }{{\text{T}}_{\text{mean}}}\text{}{{\text{T}}_{\text{4}}} <text:s/>\\</text:p>
      <text:p text:style-name="P129">\end{array} <text:s/>\\</text:p>
      <text:p text:style-name="P130">\end{array} <text:s/>\\</text:p>
      <text:p text:style-name="P131"><text:span text:style-name="T132">\end{array} \right.$</text:span><text:span text:style-name="T133"><text:tab/>(</text:span><text:span text:style-name="T134">10</text:span><text:span text:style-name="T135">)</text:span></text:p>
      <text:h text:style-name="P136" text:outline-level="4">Dry matter partitioning</text:h>
      <text:p text:style-name="P137"><text:span text:style-name="T138">Total dry matter growth is split between growth of root dry matter (DM</text:span><text:span text:style-name="T139">Root</text:span><text:span text:style-name="T140"><text:s/>[g m</text:span><text:span text:style-name="T141">-2</text:span><text:span text:style-name="T142">], eq. 12) and shoot dry matter (DM</text:span><text:span text:style-name="T143">Shoot</text:span><text:span text:style-name="T144"><text:s/>[g m</text:span><text:span text:style-name="T145">-2</text:span><text:span text:style-name="T146">], eq. 13). Before stem elongation, root dry matter growth depends on the temperature sum from emergence (</text:span><text:span text:style-name="T147"><text:bookmark-ref text:ref-name="_Ref416009222" text:reference-format="text">Fehler! Verweisquelle konnte nicht gefunden werden.</text:bookmark-ref></text:span><text:span text:style-name="T148">). The ratio dDM</text:span><text:span text:style-name="T149">Root</text:span><text:span text:style-name="T150">/dDM</text:span><text:span text:style-name="T151">Plant</text:span><text:span text:style-name="T152"><text:s/>(f</text:span><text:span text:style-name="T153">Root</text:span><text:span text:style-name="T154">, eq. 11) is described by an exponential function of the temperature sum after emergence (TempSum</text:span><text:span text:style-name="T155">Emerge</text:span><text:span text:style-name="T156">) with a base temperature of 3°C. From the beginning of stem elongation, f</text:span><text:span text:style-name="T157">Root</text:span><text:span text:style-name="T158"><text:s/>decreased linearly to a minimum of 0.05<text:s/></text:span><text:soft-page-break/><text:span text:style-name="T159">within 100°Cd. After flowering, it was assumed that 5% of total dry matter increase was allocated to the roots (Barraclough 1989).</text:span></text:p>
      <text:p text:style-name="P160">${{\text{f}}_{\text{Root}}}\text{=}\left\{ \begin{array}{*{35}{l}}</text:p>
      <text:p text:style-name="P161"><text:s text:c="3"/>\text{roo}{{\text{t}}_{\text{i}}}\text{*(TempSu}{{\text{m}}_{\text{Emerge}}}{{\text{)}}^{\text{2}}}\text{+roo}{{\text{t}}_{\text{s}}}\text{*TempSu}{{\text{m}}_{\text{Emerge}}}\text{, }\!\!~\!\!\text{ <text:s/>}\!\!~\!\!\text{ <text:s/>}\!\!~\!\!\text{ <text:s/>}\!\!~\!\!\text{ <text:s/>}\!\!~\!\!\text{ <text:s/>}\!\!~\!\!\text{ <text:s/>}\!\!~\!\!\text{ <text:s/>}\!\!~\!\!\text{ EC}\le \text{30} <text:s/>\\</text:p>
      <text:p text:style-name="P162"><text:s text:c="3"/>\frac{\text{0}\text{.05-roo}{{\text{t}}_{\text{EC30}}}}{\text{100}}\text{*TempSum+roo}{{\text{t}}_{\text{EC30}}}\text{, }\!\!~\!\!\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30EC}\le \text{69} <text:s/>\\</text:p>
      <text:p text:style-name="P163"><text:s text:c="3"/>\text{0}\text{.05, }\!\!~\!\!\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text:s/>}\!\!~\!\!\text{ EC69} <text:s/>\\</text:p>
      <text:p text:style-name="P164"><text:span text:style-name="T165">\end{array} \right.$</text:span><text:span text:style-name="T166"><text:tab/>(</text:span><text:span text:style-name="T167">11</text:span><text:span text:style-name="T168">)</text:span></text:p>
      <text:p text:style-name="P169">$\begin{matrix}</text:p>
      <text:p text:style-name="P170"><text:s text:c="3"/>\frac{\text{dDMRoot}}{\text{dt}}\text{=fRoot*}\frac{\text{dDMPlant}}{\text{dt}} <text:s/>\\</text:p>
      <text:p text:style-name="P171"><text:span text:style-name="T172">\end{matrix}$</text:span><text:span text:style-name="T173"><text:tab/>(</text:span><text:span text:style-name="T174">12</text:span><text:span text:style-name="T175">)</text:span></text:p>
      <text:p text:style-name="P176"><text:span text:style-name="T177">$\frac{\text{dDMShoot}}{\text{dt}}\text{=}\frac{\text{dDMPlant}}{\text{dt}}\text{-}\frac{\text{dDMRoot}}{\text{dt}}$</text:span><text:span text:style-name="T178"><text:tab/>(</text:span><text:span text:style-name="T179">13</text:span><text:span text:style-name="T180">)</text:span></text:p>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margin-top="0.0833in">
        <style:tab-stops>
          <style:tab-stop style:type="left" style:position="0in"/>
          <style:tab-stop style:type="left" style:position="0.0937in"/>
          <style:tab-stop style:type="left" style:position="0.2909in"/>
        </style:tab-stops>
      </style:paragraph-properties>
      <style:text-properties fo:font-weight="bold" style:font-weight-asian="bold" style:font-weight-complex="bold" style:letter-kerning="true" fo:font-size="12pt" style:font-size-asian="12pt" style:font-size-complex="16pt" fo:hyphenate="false"/>
    </style:style>
    <style:style style:name="Überschrift2" style:display-name="Überschrift 2" style:family="paragraph" style:parent-style-name="Überschrift1" style:next-style-name="Standard" style:auto-update="true" style:default-outline-level="2">
      <style:text-properties style:font-weight-complex="normal" fo:color="#000000"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style:text-properties fo:font-weight="bold" style:font-weight-asian="bold" style:font-weight-complex="bold" style:font-size-complex="13pt" fo:hyphenate="false"/>
    </style:style>
    <style:style style:name="Standard" style:display-name="Standard" style:family="paragraph">
      <style:paragraph-properties fo:keep-together="always" fo:widows="0" fo:orphans="0" fo:text-align="justify" fo:margin-bottom="0.0416in" fo:line-height="120%" fo:margin-left="0.3979in">
        <style:tab-stops>
          <style:tab-stop style:type="left" style:position="-0.0041in"/>
        </style:tab-stops>
      </style:paragraph-properties>
      <style:text-properties style:font-name="Arial" style:font-name-complex="Arial" fo:font-size="10pt" style:font-size-asian="10pt" fo:language="en" fo:country="GB" style:language-asian="de" style:country-asian="DE" fo:hyphenate="false"/>
    </style:style>
    <style:style style:name="Absatz-Standardschriftart" style:display-name="Absatz-Standardschriftart" style:family="text"/>
    <style:style style:name="Abbildung" style:display-name="Abbildung" style:family="paragraph" style:parent-style-name="Standard">
      <style:paragraph-properties fo:keep-with-next="always" fo:text-align="center"/>
      <style:text-properties fo:hyphenate="false"/>
    </style:style>
    <style:style style:name="Beschriftung" style:display-name="Beschriftung" style:family="paragraph" style:parent-style-name="Standard" style:next-style-name="Standard">
      <style:paragraph-properties fo:margin-bottom="0.1388in" fo:line-height="100%" fo:margin-left="1.0277in" fo:text-indent="-0.6298in">
        <style:tab-stops>
          <style:tab-stop style:type="left" style:position="-0.3979in"/>
        </style:tab-stops>
      </style:paragraph-properties>
      <style:text-properties style:font-weight-complex="bold" style:font-size-complex="9pt" fo:hyphenate="false"/>
    </style:style>
    <style:style style:name="Textkörper" style:display-name="Textkörper" style:family="paragraph" style:parent-style-name="Standard" style:auto-update="true">
      <style:paragraph-properties fo:keep-together="auto" fo:widows="2" fo:orphans="2" fo:margin-bottom="0in" fo:line-height="200%" fo:margin-left="0in">
        <style:tab-stops>
          <style:tab-stop style:type="left" style:position="1.75in"/>
          <style:tab-stop style:type="right" style:position="6.625in"/>
        </style:tab-stops>
      </style:paragraph-properties>
      <style:text-properties style:font-name="Times New Roman" fo:font-size="12pt" style:font-size-asian="12pt" style:font-size-complex="12pt" fo:hyphenate="false"/>
    </style:style>
    <style:style style:name="TextkörperZchn" style:display-name="Textkörper Zchn" style:family="text" style:parent-style-name="Absatz-Standardschriftart">
      <style:text-properties style:font-name="Times New Roman" style:font-name-asian="Times New Roman" style:font-name-complex="Arial" fo:font-size="12pt" style:font-size-asian="12pt" style:font-size-complex="12pt" fo:language="en" fo:country="GB" style:language-asian="de" style:country-asian="DE"/>
    </style:style>
    <style:style style:name="Formel" style:display-name="Formel" style:family="paragraph" style:parent-style-name="Textkörper">
      <style:paragraph-properties fo:text-align="start" fo:margin-top="0.1666in" fo:margin-bottom="0.1666in" fo:line-height="150%">
        <style:tab-stops>
          <style:tab-stop style:type="left" style:position="0.7875in"/>
          <style:tab-stop style:type="right" style:position="6.3in"/>
        </style:tab-stops>
      </style:paragraph-properties>
      <style:text-properties style:font-name="Cambria Math" fo:font-style="italic" style:font-style-asian="italic" fo:hyphenate="false"/>
    </style:style>
    <style:style style:name="Formelbeschriftung" style:display-name="Formelbeschriftung" style:family="paragraph" style:parent-style-name="Beschriftung" style:next-style-name="Textkörper">
      <style:paragraph-properties fo:keep-together="auto" fo:widows="2" fo:orphans="2" fo:text-align="end" fo:margin-top="0.0833in" fo:margin-bottom="0.0833in" fo:line-height="150%" fo:margin-left="0in" fo:text-indent="0in">
        <style:tab-stops/>
      </style:paragraph-properties>
      <style:text-properties style:font-name="Times New Roman" style:font-name-complex="Times New Roman" fo:font-size="12pt" style:font-size-asian="12pt" style:font-size-complex="10pt" fo:hyphenate="false"/>
    </style:style>
    <style:style style:name="Fußzeile" style:display-name="Fußzeile" style:family="paragraph" style:parent-style-name="Standard">
      <style:paragraph-properties fo:margin-bottom="0in" fo:line-height="100%">
        <style:tab-stops>
          <style:tab-stop style:type="center" style:position="2.752in"/>
          <style:tab-stop style:type="right" style:position="5.902in"/>
        </style:tab-stops>
      </style:paragraph-properties>
      <style:text-properties fo:hyphenate="false"/>
    </style:style>
    <style:style style:name="FußzeileZchn" style:display-name="Fußzeile Zchn" style:family="text" style:parent-style-name="Absatz-Standardschriftart">
      <style:text-properties style:font-name="Arial" style:font-name-asian="Times New Roman" style:font-name-complex="Arial" fo:font-size="10pt" style:font-size-asian="10pt" style:language-asian="de" style:country-asian="DE"/>
    </style:style>
    <style:style style:name="Gleichung" style:display-name="Gleichung" style:family="paragraph" style:parent-style-name="Beschriftung">
      <style:paragraph-properties fo:margin-top="0.1666in" fo:margin-bottom="0.1666in">
        <style:tab-stops>
          <style:tab-stop style:type="left" style:position="0.5472in"/>
        </style:tab-stops>
      </style:paragraph-properties>
      <style:text-properties fo:language="en" fo:country="US" fo:hyphenate="false"/>
    </style:style>
    <style:style style:name="Hervorhebung" style:display-name="Hervorhebung" style:family="text" style:parent-style-name="Absatz-Standardschriftart">
      <style:text-properties fo:font-style="italic" style:font-style-asian="italic" style:font-style-complex="italic"/>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Kopfzeile" style:display-name="Kopfzeile" style:family="paragraph" style:parent-style-name="Standard">
      <style:paragraph-properties fo:margin-bottom="0in" fo:line-height="100%">
        <style:tab-stops>
          <style:tab-stop style:type="center" style:position="2.752in"/>
          <style:tab-stop style:type="right" style:position="5.902in"/>
        </style:tab-stops>
      </style:paragraph-properties>
      <style:text-properties fo:hyphenate="false"/>
    </style:style>
    <style:style style:name="KopfzeileZchn" style:display-name="Kopfzeile Zchn" style:family="text" style:parent-style-name="Absatz-Standardschriftart">
      <style:text-properties style:font-name="Arial" style:font-name-asian="Times New Roman" style:font-name-complex="Arial" fo:font-size="10pt" style:font-size-asian="10pt" style:language-asian="de" style:country-asian="DE"/>
    </style:style>
    <style:style style:name="Listenabsatz" style:display-name="Listenabsatz" style:family="paragraph" style:parent-style-name="Standard">
      <style:paragraph-properties style:contextual-spacing="true" fo:margin-left="0.5in">
        <style:tab-stops>
          <style:tab-stop style:type="left" style:position="-0.1062in"/>
        </style:tab-stops>
      </style:paragraph-properties>
      <style:text-properties fo:hyphenate="false"/>
    </style:style>
    <style:style style:name="Literatur" style:display-name="Literatur" style:family="paragraph" style:parent-style-name="Standard">
      <style:paragraph-properties fo:margin-left="0.7916in" fo:text-indent="-0.3937in">
        <style:tab-stops>
          <style:tab-stop style:type="left" style:position="-0.3979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Titel" style:display-name="Titel" style:family="paragraph" style:parent-style-name="Standard" style:next-style-name="Standard" style:default-outline-level="1">
      <style:paragraph-properties fo:keep-together="auto" fo:widows="2" fo:orphans="2" fo:text-align="center" fo:margin-top="0.1666in" style:line-height-at-least="0.1666in" fo:margin-left="0in">
        <style:tab-stops/>
      </style:paragraph-properties>
      <style:text-properties style:font-name="Cambria" style:font-name-complex="Times New Roman" fo:font-weight="bold" style:font-weight-asian="bold" style:font-weight-complex="bold" style:letter-kerning="true" fo:font-size="16pt" style:font-size-asian="16pt" style:font-size-complex="16pt" fo:hyphenate="false"/>
    </style:style>
    <style:style style:name="TitelZchn" style:display-name="Titel Zchn" style:family="text" style:parent-style-name="Absatz-Standardschriftar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de" style:country-asian="DE"/>
    </style:style>
    <style:style style:name="Überschrift1Zchn" style:display-name="Überschrift 1 Zchn" style:family="text">
      <style:text-properties style:font-name="Arial" style:font-name-asian="Times New Roman" style:font-name-complex="Arial" fo:font-weight="bold" style:font-weight-asian="bold" style:font-weight-complex="bold" style:letter-kerning="true" fo:font-size="12pt" style:font-size-asian="12pt" style:font-size-complex="16pt" style:language-asian="de" style:country-asian="DE"/>
    </style:style>
    <style:style style:name="Überschrift2Zchn" style:display-name="Überschrift 2 Zchn" style:family="text">
      <style:text-properties style:font-name="Arial" style:font-name-asian="Times New Roman" style:font-name-complex="Arial" fo:font-weight="bold" style:font-weight-asian="bold" fo:color="#000000" style:letter-kerning="true" style:font-size-complex="16pt" style:language-asian="de" style:country-asian="DE"/>
    </style:style>
    <style:style style:name="Überschrift3Zchn" style:display-name="Überschrift 3 Zchn" style:family="text">
      <style:text-properties style:font-name="Arial" style:font-name-asian="Times New Roman" style:font-name-complex="Arial" fo:font-weight="bold" style:font-weight-asian="bold" style:font-weight-complex="bold" fo:font-size="10pt" style:font-size-asian="10pt" style:font-size-complex="13pt" style:language-asian="de" style:country-asian="DE"/>
    </style:style>
    <text:list-style style:name="ListeFNR-Antrag" style:display-name="Liste FNR-Antrag">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keep-together="auto" fo:widows="2" fo:orphans="2" fo:margin-bottom="0.1666in" fo:line-height="100%" fo:margin-left="0in">
        <style:tab-stops/>
      </style:paragraph-properties>
      <style:text-properties style:font-name="Calibri" style:font-name-asian="Calibri" style:font-name-complex="Times New Roman" style:font-size-complex="10pt" fo:language="de" fo:country="DE" style:language-asian="en" style:country-asian="US" fo:hyphenate="false"/>
    </style:style>
    <style:style style:name="KommentartextZchn" style:display-name="Kommentartext Zchn" style:family="text" style:parent-style-name="Absatz-Standardschriftart">
      <style:text-properties style:font-name-asian="Calibri" fo:font-size="10pt" style:font-size-asian="10pt" style:font-size-complex="10pt"/>
    </style:style>
    <style:style style:name="MTConvertedEquation" style:display-name="MTConvertedEquation" style:family="text" style:parent-style-name="Absatz-Standardschriftart">
      <style:text-properties style:font-name="Cambria Math" style:font-name-asian="Calibri" style:font-name-complex="Calibri" fo:font-size="12pt" style:font-size-asian="12pt" fo:language="en" fo:country="US"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ge, Prof. Dr. Henning</meta:initial-creator>
    <dc:creator>Kage, Prof. Dr. Henning</dc:creator>
    <meta:creation-date>2025-06-27T06:39:00Z</meta:creation-date>
    <dc:date>2025-06-27T06:42:00Z</dc:date>
    <meta:template xlink:href="Normal.dotm" xlink:type="simple"/>
    <meta:editing-cycles>3</meta:editing-cycles>
    <meta:editing-duration>PT0S</meta:editing-duration>
    <meta:user-defined meta:name="MTWinEqns" meta:value-type="boolean">true</meta:user-defined>
    <meta:document-statistic meta:page-count="5" meta:paragraph-count="23" meta:word-count="1641" meta:character-count="11963" meta:row-count="86" meta:non-whitespace-character-count="10345"/>
  </office:meta>
</office:document-meta>
</file>